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86cm" table:align="left"/>
    </style:style>
    <style:style style:name="Tabla1.A" style:family="table-column">
      <style:table-column-properties style:column-width="4.339cm"/>
    </style:style>
    <style:style style:name="Tabla1.B" style:family="table-column">
      <style:table-column-properties style:column-width="3.52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FORME DE ARQUITECTURA FRONTEND</text:h>
      <text:h text:style-name="Heading_20_1" text:outline-level="1">Proyecto Pérgamo</text:h>
      <text:h text:style-name="Heading_20_2" text:outline-level="2">Angular 21 + Arquitectura Hexagonal</text:h>
      <text:p text:style-name="Text_20_body"><text:span text:style-name="Strong_20_Emphasis">Versión:</text:span> 1.0<text:line-break/><text:span text:style-name="Strong_20_Emphasis">Fecha:</text:span> Junio 2026<text:line-break/><text:span text:style-name="Strong_20_Emphasis">Framework:</text:span> Angular 21<text:line-break/><text:span text:style-name="Strong_20_Emphasis">Arquitectura:</text:span> Hexagonal (Ports &amp; Adapters)<text:line-break/><text:span text:style-name="Strong_20_Emphasis">Patrón de diseño principal:</text:span> Clean Architecture + DDD ligero + Signal First</text:p>
      <text:p text:style-name="Horizontal_20_Line"/>
      <text:h text:style-name="Heading_20_1" text:outline-level="1">1. Objetivo</text:h>
      <text:p text:style-name="Text_20_body">Definir la arquitectura base para el desarrollo del Frontend del proyecto Pérgamo utilizando Angular 21, garantizando:</text:p>
      <text:list text:style-name="L1">
        <text:list-item>
          <text:p text:style-name="P1">Escalabilidad. </text:p>
        </text:list-item>
        <text:list-item>
          <text:p text:style-name="P1">Mantenibilidad. </text:p>
        </text:list-item>
        <text:list-item>
          <text:p text:style-name="P1">Bajo acoplamiento. </text:p>
        </text:list-item>
        <text:list-item>
          <text:p text:style-name="P1">Alta cohesión. </text:p>
        </text:list-item>
        <text:list-item>
          <text:p text:style-name="P1">Facilidad para pruebas unitarias. </text:p>
        </text:list-item>
        <text:list-item>
          <text:p text:style-name="P1">Facilidad para migraciones futuras. </text:p>
        </text:list-item>
        <text:list-item>
          <text:p text:style-name="P2">Compatibilidad con las nuevas características de Angular 21. </text:p>
        </text:list-item>
      </text:list>
      <text:p text:style-name="Horizontal_20_Line"/>
      <text:h text:style-name="Heading_20_1" text:outline-level="1">2. ¿Por qué Arquitectura Hexagonal?</text:h>
      <text:p text:style-name="Text_20_body">La Arquitectura Hexagonal (Ports &amp; Adapters) busca aislar el núcleo de negocio de cualquier tecnología externa.</text:p>
      <text:p text:style-name="Text_20_body">Esto significa que:</text:p>
      <text:list text:style-name="L2">
        <text:list-item>
          <text:p text:style-name="P3">La lógica del negocio no conoce Angular. </text:p>
        </text:list-item>
        <text:list-item>
          <text:p text:style-name="P3">La lógica del negocio no conoce HttpClient. </text:p>
        </text:list-item>
        <text:list-item>
          <text:p text:style-name="P3">La lógica del negocio no conoce APIs. </text:p>
        </text:list-item>
        <text:list-item>
          <text:p text:style-name="P4">La lógica del negocio no conoce componentes visuales. </text:p>
        </text:list-item>
      </text:list>
      <text:p text:style-name="Text_20_body">Angular se convierte únicamente en un adaptador.</text:p>
      <text:p text:style-name="Horizontal_20_Line"/>
      <text:h text:style-name="Heading_20_2" text:outline-level="2"><text:soft-page-break/>Arquitectura General</text:h>
      <text:section text:style-name="Sect1" text:name="code-block-viewer">
        <text:p text:style-name="P5"><text:span text:style-name="Source_20_Text">┌───────────────────────────┐</text:span></text:p>
        <text:p text:style-name="Preformatted_20_Text"><text:span text:style-name="Source_20_Text">│ <text:s text:c="6"/>Presentation <text:s text:c="7"/>│</text:span></text:p>
        <text:p text:style-name="Preformatted_20_Text"><text:span text:style-name="Source_20_Text">│ (Pages, Components, UI) <text:s text:c="2"/>│</text:span></text:p>
        <text:p text:style-name="Preformatted_20_Text"><text:span text:style-name="Source_20_Text">└─────────────┬─────────────┘</text:span></text:p>
        <text:p text:style-name="Preformatted_20_Text"><text:span text:style-name="Source_20_Text"><text:s text:c="14"/>│</text:span></text:p>
        <text:p text:style-name="Preformatted_20_Text"><text:span text:style-name="Source_20_Text"><text:s text:c="14"/>▼</text:span></text:p>
        <text:p text:style-name="Preformatted_20_Text"><text:span text:style-name="Source_20_Text">┌───────────────────────────┐</text:span></text:p>
        <text:p text:style-name="Preformatted_20_Text"><text:span text:style-name="Source_20_Text">│ <text:s text:c="5"/>Application Layer <text:s text:c="3"/>│</text:span></text:p>
        <text:p text:style-name="Preformatted_20_Text"><text:span text:style-name="Source_20_Text">│ <text:s text:c="5"/>Use Cases <text:s text:c="11"/>│</text:span></text:p>
        <text:p text:style-name="Preformatted_20_Text"><text:span text:style-name="Source_20_Text">└─────────────┬─────────────┘</text:span></text:p>
        <text:p text:style-name="Preformatted_20_Text"><text:span text:style-name="Source_20_Text"><text:s text:c="14"/>│</text:span></text:p>
        <text:p text:style-name="Preformatted_20_Text"><text:span text:style-name="Source_20_Text"><text:s text:c="14"/>▼</text:span></text:p>
        <text:p text:style-name="Preformatted_20_Text"><text:span text:style-name="Source_20_Text">┌───────────────────────────┐</text:span></text:p>
        <text:p text:style-name="Preformatted_20_Text"><text:span text:style-name="Source_20_Text">│ <text:s text:c="8"/>Domain <text:s text:c="11"/>│</text:span></text:p>
        <text:p text:style-name="Preformatted_20_Text"><text:span text:style-name="Source_20_Text">│ Entities - Ports <text:s text:c="9"/>│</text:span></text:p>
        <text:p text:style-name="Preformatted_20_Text"><text:span text:style-name="Source_20_Text">└─────────────┬─────────────┘</text:span></text:p>
        <text:p text:style-name="Preformatted_20_Text"><text:span text:style-name="Source_20_Text"><text:s text:c="14"/>│</text:span></text:p>
        <text:p text:style-name="Preformatted_20_Text"><text:span text:style-name="Source_20_Text"><text:s text:c="14"/>▼</text:span></text:p>
        <text:p text:style-name="Preformatted_20_Text"><text:span text:style-name="Source_20_Text">┌───────────────────────────┐</text:span></text:p>
        <text:p text:style-name="Preformatted_20_Text"><text:span text:style-name="Source_20_Text">│ <text:s text:c="5"/>Infrastructure <text:s text:c="6"/>│</text:span></text:p>
        <text:p text:style-name="Preformatted_20_Text"><text:span text:style-name="Source_20_Text">│ API - LocalStorage <text:s text:c="7"/>│</text:span></text:p>
        <text:p text:style-name="Preformatted_20_Text"><text:span text:style-name="Source_20_Text">│ Services - Adapters <text:s text:c="6"/>│</text:span></text:p>
        <text:p text:style-name="P6"><text:span text:style-name="Source_20_Text">└───────────────────────────┘</text:span></text:p>
      </text:section>
      <text:p text:style-name="Horizontal_20_Line"/>
      <text:h text:style-name="Heading_20_1" text:outline-level="1">3. Principios Arquitectónicos</text:h>
      <text:h text:style-name="Heading_20_2" text:outline-level="2">3.1 Dependency Rule</text:h>
      <text:p text:style-name="Text_20_body">Las dependencias siempre apuntan hacia adentro.</text:p>
      <text:section text:style-name="Sect1" text:name="Sección1">
        <text:p text:style-name="P5"><text:bookmark text:name="code-block-viewer"/><text:span text:style-name="Source_20_Text">Infrastructure</text:span></text:p>
        <text:p text:style-name="Preformatted_20_Text"><text:span text:style-name="Source_20_Text"><text:s text:c="6"/>↓</text:span></text:p>
        <text:p text:style-name="Preformatted_20_Text"><text:span text:style-name="Source_20_Text">Application</text:span></text:p>
        <text:p text:style-name="Preformatted_20_Text"><text:span text:style-name="Source_20_Text"><text:s text:c="6"/>↓</text:span></text:p>
        <text:p text:style-name="P6"><text:span text:style-name="Source_20_Text">Domain</text:span></text:p>
      </text:section>
      <text:p text:style-name="Text_20_body">Nunca:</text:p>
      <text:section text:style-name="Sect1" text:name="Sección2">
        <text:p text:style-name="P5"><text:bookmark text:name="code-block-viewer Copia 1"/><text:span text:style-name="Source_20_Text">Domain</text:span></text:p>
        <text:p text:style-name="Preformatted_20_Text"><text:span text:style-name="Source_20_Text"><text:s text:c="3"/>↓</text:span></text:p>
        <text:p text:style-name="P6"><text:span text:style-name="Source_20_Text">Infrastructure</text:span></text:p>
      </text:section>
      <text:p text:style-name="Horizontal_20_Line"/>
      <text:h text:style-name="Heading_20_2" text:outline-level="2">3.2 Domain First</text:h>
      <text:p text:style-name="Text_20_body">Todo inicia desde el dominio.</text:p>
      <text:p text:style-name="Text_20_body">Antes de crear:</text:p>
      <text:list text:style-name="L3">
        <text:list-item>
          <text:p text:style-name="P7"><text:soft-page-break/>Componentes </text:p>
        </text:list-item>
        <text:list-item>
          <text:p text:style-name="P7">Servicios </text:p>
        </text:list-item>
        <text:list-item>
          <text:p text:style-name="P8">Endpoints </text:p>
        </text:list-item>
      </text:list>
      <text:p text:style-name="Text_20_body">Debe existir:</text:p>
      <text:list text:style-name="L4">
        <text:list-item>
          <text:p text:style-name="P9">Entidad </text:p>
        </text:list-item>
        <text:list-item>
          <text:p text:style-name="P9">Caso de uso </text:p>
        </text:list-item>
        <text:list-item>
          <text:p text:style-name="P10">Puerto </text:p>
        </text:list-item>
      </text:list>
      <text:p text:style-name="Horizontal_20_Line"/>
      <text:h text:style-name="Heading_20_2" text:outline-level="2">3.3 Feature Based</text:h>
      <text:p text:style-name="Text_20_body">La aplicación se organizará por funcionalidades y no por tipos de archivos.</text:p>
      <text:p text:style-name="Text_20_body">Incorrecto:</text:p>
      <text:section text:style-name="Sect1" text:name="Sección3">
        <text:p text:style-name="P5"><text:bookmark text:name="code-block-viewer Copia 2"/><text:span text:style-name="Source_20_Text">components/</text:span></text:p>
        <text:p text:style-name="Preformatted_20_Text"><text:span text:style-name="Source_20_Text">services/</text:span></text:p>
        <text:p text:style-name="Preformatted_20_Text"><text:span text:style-name="Source_20_Text">interfaces/</text:span></text:p>
        <text:p text:style-name="P6"><text:span text:style-name="Source_20_Text">models/</text:span></text:p>
      </text:section>
      <text:p text:style-name="Text_20_body">Correcto:</text:p>
      <text:section text:style-name="Sect1" text:name="Sección4">
        <text:p text:style-name="P5"><text:bookmark text:name="code-block-viewer Copia 3"/><text:span text:style-name="Source_20_Text">auth/</text:span></text:p>
        <text:p text:style-name="Preformatted_20_Text"><text:span text:style-name="Source_20_Text">users/</text:span></text:p>
        <text:p text:style-name="Preformatted_20_Text"><text:span text:style-name="Source_20_Text">accounting/</text:span></text:p>
        <text:p text:style-name="P6"><text:span text:style-name="Source_20_Text">reports/</text:span></text:p>
      </text:section>
      <text:p text:style-name="Horizontal_20_Line"/>
      <text:h text:style-name="Heading_20_1" text:outline-level="1">4. Estructura de Carpetas</text:h>
      <text:section text:style-name="Sect1" text:name="Sección5">
        <text:p text:style-name="P5"><text:bookmark text:name="code-block-viewer Copia 4"/><text:span text:style-name="Source_20_Text">src/</text:span></text:p>
        <text:p text:style-name="Preformatted_20_Text"><text:span text:style-name="Source_20_Text">│</text:span></text:p>
        <text:p text:style-name="Preformatted_20_Text"><text:span text:style-name="Source_20_Text">├── app/</text:span></text:p>
        <text:p text:style-name="Preformatted_20_Text"><text:span text:style-name="Source_20_Text">│</text:span></text:p>
        <text:p text:style-name="Preformatted_20_Text"><text:span text:style-name="Source_20_Text">├── core/</text:span></text:p>
        <text:p text:style-name="Preformatted_20_Text"><text:span text:style-name="Source_20_Text">│</text:span></text:p>
        <text:p text:style-name="Preformatted_20_Text"><text:span text:style-name="Source_20_Text">├── domain/</text:span></text:p>
        <text:p text:style-name="Preformatted_20_Text"><text:span text:style-name="Source_20_Text">│</text:span></text:p>
        <text:p text:style-name="Preformatted_20_Text"><text:span text:style-name="Source_20_Text">├── application/</text:span></text:p>
        <text:p text:style-name="Preformatted_20_Text"><text:span text:style-name="Source_20_Text">│</text:span></text:p>
        <text:p text:style-name="Preformatted_20_Text"><text:span text:style-name="Source_20_Text">├── infrastructure/</text:span></text:p>
        <text:p text:style-name="Preformatted_20_Text"><text:span text:style-name="Source_20_Text">│</text:span></text:p>
        <text:p text:style-name="Preformatted_20_Text"><text:span text:style-name="Source_20_Text">├── presentation/</text:span></text:p>
        <text:p text:style-name="Preformatted_20_Text"><text:span text:style-name="Source_20_Text">│</text:span></text:p>
        <text:p text:style-name="Preformatted_20_Text"><text:span text:style-name="Source_20_Text">├── shared/</text:span></text:p>
        <text:p text:style-name="Preformatted_20_Text"><text:span text:style-name="Source_20_Text">│</text:span></text:p>
        <text:p text:style-name="P6"><text:span text:style-name="Source_20_Text">└── app.config.ts</text:span></text:p>
      </text:section>
      <text:p text:style-name="Horizontal_20_Line"/>
      <text:h text:style-name="Heading_20_1" text:outline-level="1"><text:soft-page-break/>5. Domain Layer</text:h>
      <text:p text:style-name="Text_20_body">Contiene las reglas de negocio.</text:p>
      <text:section text:style-name="Sect1" text:name="Sección6">
        <text:p text:style-name="P5"><text:bookmark text:name="code-block-viewer Copia 5"/><text:span text:style-name="Source_20_Text">domain/</text:span></text:p>
        <text:p text:style-name="Preformatted_20_Text"><text:span text:style-name="Source_20_Text">│</text:span></text:p>
        <text:p text:style-name="Preformatted_20_Text"><text:span text:style-name="Source_20_Text">├── auth/</text:span></text:p>
        <text:p text:style-name="Preformatted_20_Text"><text:span text:style-name="Source_20_Text">│ <text:s text:c="2"/>├── entities/</text:span></text:p>
        <text:p text:style-name="Preformatted_20_Text"><text:span text:style-name="Source_20_Text">│ <text:s text:c="2"/>├── ports/</text:span></text:p>
        <text:p text:style-name="Preformatted_20_Text"><text:span text:style-name="Source_20_Text">│ <text:s text:c="2"/>└── value-objects/</text:span></text:p>
        <text:p text:style-name="Preformatted_20_Text"><text:span text:style-name="Source_20_Text">│</text:span></text:p>
        <text:p text:style-name="Preformatted_20_Text"><text:span text:style-name="Source_20_Text">├── users/</text:span></text:p>
        <text:p text:style-name="Preformatted_20_Text"><text:span text:style-name="Source_20_Text">│</text:span></text:p>
        <text:p text:style-name="P6"><text:span text:style-name="Source_20_Text">└── accounting/</text:span></text:p>
      </text:section>
      <text:p text:style-name="Horizontal_20_Line"/>
      <text:h text:style-name="Heading_20_2" text:outline-level="2">Ejemplo</text:h>
      <text:section text:style-name="Sect1" text:name="Sección7">
        <text:p text:style-name="P5"><text:bookmark text:name="code-block-viewer Copia 6"/><text:span text:style-name="Source_20_Text">export interface User {</text:span></text:p>
        <text:p text:style-name="Preformatted_20_Text"><text:span text:style-name="Source_20_Text"><text:s text:c="2"/>id: number;</text:span></text:p>
        <text:p text:style-name="Preformatted_20_Text"><text:span text:style-name="Source_20_Text"><text:s text:c="2"/>name: string;</text:span></text:p>
        <text:p text:style-name="Preformatted_20_Text"><text:span text:style-name="Source_20_Text"><text:s text:c="2"/>email: string;</text:span></text:p>
        <text:p text:style-name="P6"><text:span text:style-name="Source_20_Text">}</text:span></text:p>
      </text:section>
      <text:p text:style-name="Horizontal_20_Line"/>
      <text:h text:style-name="Heading_20_2" text:outline-level="2">Puerto</text:h>
      <text:section text:style-name="Sect1" text:name="Sección8">
        <text:p text:style-name="P5"><text:bookmark text:name="code-block-viewer Copia 7"/><text:span text:style-name="Source_20_Text">export abstract class UserRepository {</text:span></text:p>
        <text:p text:style-name="Preformatted_20_Text"><text:span text:style-name="Source_20_Text"><text:s text:c="2"/>abstract getUsers(): Promise&lt;User[]&gt;;</text:span></text:p>
        <text:p text:style-name="P6"><text:span text:style-name="Source_20_Text">}</text:span></text:p>
      </text:section>
      <text:p text:style-name="Horizontal_20_Line"/>
      <text:h text:style-name="Heading_20_1" text:outline-level="1">6. Application Layer</text:h>
      <text:p text:style-name="Text_20_body">Contiene los casos de uso.</text:p>
      <text:section text:style-name="Sect1" text:name="Sección9">
        <text:p text:style-name="P5"><text:bookmark text:name="code-block-viewer Copia 8"/><text:span text:style-name="Source_20_Text">application/</text:span></text:p>
        <text:p text:style-name="Preformatted_20_Text"><text:span text:style-name="Source_20_Text">│</text:span></text:p>
        <text:p text:style-name="Preformatted_20_Text"><text:span text:style-name="Source_20_Text">├── auth/</text:span></text:p>
        <text:p text:style-name="Preformatted_20_Text"><text:span text:style-name="Source_20_Text">│</text:span></text:p>
        <text:p text:style-name="Preformatted_20_Text"><text:span text:style-name="Source_20_Text">├── users/</text:span></text:p>
        <text:p text:style-name="Preformatted_20_Text"><text:span text:style-name="Source_20_Text">│ <text:s text:c="2"/>├── use-cases/</text:span></text:p>
        <text:p text:style-name="Preformatted_20_Text"><text:span text:style-name="Source_20_Text">│</text:span></text:p>
        <text:p text:style-name="P6"><text:span text:style-name="Source_20_Text">└── accounting/</text:span></text:p>
      </text:section>
      <text:p text:style-name="Horizontal_20_Line"/>
      <text:h text:style-name="Heading_20_2" text:outline-level="2">Ejemplo</text:h>
      <text:section text:style-name="Sect1" text:name="Sección10">
        <text:p text:style-name="P5"><text:bookmark text:name="code-block-viewer Copia 9"/><text:soft-page-break/><text:span text:style-name="Source_20_Text">export class GetUsersUseCase {</text:span></text:p>
        <text:p text:style-name="Preformatted_20_Text"><text:span text:style-name="Source_20_Text"><text:s text:c="2"/>constructor(</text:span></text:p>
        <text:p text:style-name="Preformatted_20_Text"><text:span text:style-name="Source_20_Text"><text:s text:c="4"/>private repository: UserRepository</text:span></text:p>
        <text:p text:style-name="Preformatted_20_Text"><text:span text:style-name="Source_20_Text"><text:s text:c="2"/>) {}</text:span></text:p>
        <text:p text:style-name="Preformatted_20_Text"><text:span text:style-name="Source_20_Text"><text:s text:c="2"/>execute() {</text:span></text:p>
        <text:p text:style-name="Preformatted_20_Text"><text:span text:style-name="Source_20_Text"><text:s text:c="4"/>return this.repository.getUsers();</text:span></text:p>
        <text:p text:style-name="Preformatted_20_Text"><text:span text:style-name="Source_20_Text"><text:s text:c="2"/>}</text:span></text:p>
        <text:p text:style-name="P6"><text:span text:style-name="Source_20_Text">}</text:span></text:p>
      </text:section>
      <text:p text:style-name="Horizontal_20_Line"/>
      <text:h text:style-name="Heading_20_1" text:outline-level="1">7. Infrastructure Layer</text:h>
      <text:p text:style-name="Text_20_body">Implementaciones concretas.</text:p>
      <text:section text:style-name="Sect1" text:name="Sección11">
        <text:p text:style-name="P5"><text:bookmark text:name="code-block-viewer Copia 10"/><text:span text:style-name="Source_20_Text">infrastructure/</text:span></text:p>
        <text:p text:style-name="Preformatted_20_Text"><text:span text:style-name="Source_20_Text">│</text:span></text:p>
        <text:p text:style-name="Preformatted_20_Text"><text:span text:style-name="Source_20_Text">├── api/</text:span></text:p>
        <text:p text:style-name="Preformatted_20_Text"><text:span text:style-name="Source_20_Text">│</text:span></text:p>
        <text:p text:style-name="Preformatted_20_Text"><text:span text:style-name="Source_20_Text">├── repositories/</text:span></text:p>
        <text:p text:style-name="Preformatted_20_Text"><text:span text:style-name="Source_20_Text">│</text:span></text:p>
        <text:p text:style-name="Preformatted_20_Text"><text:span text:style-name="Source_20_Text">├── interceptors/</text:span></text:p>
        <text:p text:style-name="Preformatted_20_Text"><text:span text:style-name="Source_20_Text">│</text:span></text:p>
        <text:p text:style-name="Preformatted_20_Text"><text:span text:style-name="Source_20_Text">├── guards/</text:span></text:p>
        <text:p text:style-name="Preformatted_20_Text"><text:span text:style-name="Source_20_Text">│</text:span></text:p>
        <text:p text:style-name="P6"><text:span text:style-name="Source_20_Text">└── services/</text:span></text:p>
      </text:section>
      <text:p text:style-name="Horizontal_20_Line"/>
      <text:h text:style-name="Heading_20_2" text:outline-level="2">Ejemplo</text:h>
      <text:section text:style-name="Sect1" text:name="Sección12">
        <text:p text:style-name="P5"><text:bookmark text:name="code-block-viewer Copia 11"/><text:span text:style-name="Source_20_Text">@Injectable()</text:span></text:p>
        <text:p text:style-name="Preformatted_20_Text"><text:span text:style-name="Source_20_Text">export class UserApiRepository</text:span></text:p>
        <text:p text:style-name="Preformatted_20_Text"><text:span text:style-name="Source_20_Text">implements UserRepository {</text:span></text:p>
        <text:p text:style-name="Preformatted_20_Text"><text:span text:style-name="Source_20_Text"><text:s text:c="2"/>constructor(</text:span></text:p>
        <text:p text:style-name="Preformatted_20_Text"><text:span text:style-name="Source_20_Text"><text:s text:c="4"/>private http: HttpClient</text:span></text:p>
        <text:p text:style-name="Preformatted_20_Text"><text:span text:style-name="Source_20_Text"><text:s text:c="2"/>) {}</text:span></text:p>
        <text:p text:style-name="Preformatted_20_Text"><text:span text:style-name="Source_20_Text"><text:s text:c="2"/>getUsers() {</text:span></text:p>
        <text:p text:style-name="Preformatted_20_Text"><text:span text:style-name="Source_20_Text"><text:s text:c="4"/>return firstValueFrom(</text:span></text:p>
        <text:p text:style-name="Preformatted_20_Text"><text:span text:style-name="Source_20_Text"><text:s text:c="6"/>this.http.get&lt;User[]&gt;('/users')</text:span></text:p>
        <text:p text:style-name="Preformatted_20_Text"><text:span text:style-name="Source_20_Text"><text:s text:c="4"/>);</text:span></text:p>
        <text:p text:style-name="Preformatted_20_Text"><text:span text:style-name="Source_20_Text"><text:s text:c="2"/>}</text:span></text:p>
        <text:p text:style-name="P6"><text:span text:style-name="Source_20_Text">}</text:span></text:p>
      </text:section>
      <text:p text:style-name="Horizontal_20_Line"/>
      <text:h text:style-name="Heading_20_1" text:outline-level="1">8. Presentation Layer</text:h>
      <text:p text:style-name="Text_20_body">Todo lo visual.</text:p>
      <text:section text:style-name="Sect1" text:name="Sección13">
        <text:p text:style-name="P5"><text:bookmark text:name="code-block-viewer Copia 12"/><text:span text:style-name="Source_20_Text">presentation/</text:span></text:p>
        <text:p text:style-name="Preformatted_20_Text"><text:span text:style-name="Source_20_Text">│</text:span></text:p>
        <text:p text:style-name="Preformatted_20_Text"><text:span text:style-name="Source_20_Text">├── pages/</text:span></text:p>
        <text:p text:style-name="Preformatted_20_Text"><text:span text:style-name="Source_20_Text">│</text:span></text:p>
        <text:p text:style-name="Preformatted_20_Text"><text:soft-page-break/><text:span text:style-name="Source_20_Text">├── layouts/</text:span></text:p>
        <text:p text:style-name="Preformatted_20_Text"><text:span text:style-name="Source_20_Text">│</text:span></text:p>
        <text:p text:style-name="Preformatted_20_Text"><text:span text:style-name="Source_20_Text">├── components/</text:span></text:p>
        <text:p text:style-name="Preformatted_20_Text"><text:span text:style-name="Source_20_Text">│</text:span></text:p>
        <text:p text:style-name="Preformatted_20_Text"><text:span text:style-name="Source_20_Text">├── routes/</text:span></text:p>
        <text:p text:style-name="Preformatted_20_Text"><text:span text:style-name="Source_20_Text">│</text:span></text:p>
        <text:p text:style-name="P6"><text:span text:style-name="Source_20_Text">└── state/</text:span></text:p>
      </text:section>
      <text:p text:style-name="Horizontal_20_Line"/>
      <text:h text:style-name="Heading_20_1" text:outline-level="1">9. Organización por Feature</text:h>
      <text:p text:style-name="Text_20_body">Ejemplo para Usuarios.</text:p>
      <text:section text:style-name="Sect1" text:name="Sección14">
        <text:p text:style-name="P5"><text:bookmark text:name="code-block-viewer Copia 13"/><text:span text:style-name="Source_20_Text">users/</text:span></text:p>
        <text:p text:style-name="Preformatted_20_Text"><text:span text:style-name="Source_20_Text">│</text:span></text:p>
        <text:p text:style-name="Preformatted_20_Text"><text:span text:style-name="Source_20_Text">├── domain/</text:span></text:p>
        <text:p text:style-name="Preformatted_20_Text"><text:span text:style-name="Source_20_Text">│</text:span></text:p>
        <text:p text:style-name="Preformatted_20_Text"><text:span text:style-name="Source_20_Text">├── application/</text:span></text:p>
        <text:p text:style-name="Preformatted_20_Text"><text:span text:style-name="Source_20_Text">│</text:span></text:p>
        <text:p text:style-name="Preformatted_20_Text"><text:span text:style-name="Source_20_Text">├── infrastructure/</text:span></text:p>
        <text:p text:style-name="Preformatted_20_Text"><text:span text:style-name="Source_20_Text">│</text:span></text:p>
        <text:p text:style-name="P6"><text:span text:style-name="Source_20_Text">└── presentation/</text:span></text:p>
      </text:section>
      <text:p text:style-name="Horizontal_20_Line"/>
      <text:h text:style-name="Heading_20_1" text:outline-level="1">10. Manejo de Estado</text:h>
      <text:p text:style-name="Text_20_body">Angular 21 impulsa un modelo Signal First. </text:p>
      <text:p text:style-name="Text_20_body">Por lo tanto NO se utilizará NgRx inicialmente.</text:p>
      <text:p text:style-name="Text_20_body">Se utilizará:</text:p>
      <text:section text:style-name="Sect1" text:name="Sección15">
        <text:p text:style-name="P5"><text:bookmark text:name="code-block-viewer Copia 14"/><text:span text:style-name="Source_20_Text">signal()</text:span></text:p>
        <text:p text:style-name="Preformatted_20_Text"><text:span text:style-name="Source_20_Text">computed()</text:span></text:p>
        <text:p text:style-name="P6"><text:span text:style-name="Source_20_Text">effect()</text:span></text:p>
      </text:section>
      <text:p text:style-name="Horizontal_20_Line"/>
      <text:p text:style-name="Text_20_body">Ejemplo:</text:p>
      <text:section text:style-name="Sect1" text:name="Sección16">
        <text:p text:style-name="P5"><text:bookmark text:name="code-block-viewer Copia 15"/><text:span text:style-name="Source_20_Text">readonly users = signal&lt;User[]&gt;([]);</text:span></text:p>
        <text:p text:style-name="Preformatted_20_Text"><text:span text:style-name="Source_20_Text">readonly totalUsers = computed(</text:span></text:p>
        <text:p text:style-name="Preformatted_20_Text"><text:span text:style-name="Source_20_Text"><text:s text:c="2"/>() =&gt; this.users().length</text:span></text:p>
        <text:p text:style-name="P6"><text:span text:style-name="Source_20_Text">);</text:span></text:p>
      </text:section>
      <text:p text:style-name="Horizontal_20_Line"/>
      <text:h text:style-name="Heading_20_1" text:outline-level="1"><text:soft-page-break/>11. Estrategia de Reactividad</text:h>
      <text:h text:style-name="Heading_20_2" text:outline-level="2">Utilizar Signals para:</text:h>
      <text:list text:style-name="L5">
        <text:list-item>
          <text:p text:style-name="P11">Estado UI </text:p>
        </text:list-item>
        <text:list-item>
          <text:p text:style-name="P11">Formularios </text:p>
        </text:list-item>
        <text:list-item>
          <text:p text:style-name="P11">Filtros </text:p>
        </text:list-item>
        <text:list-item>
          <text:p text:style-name="P11">Tablas </text:p>
        </text:list-item>
        <text:list-item>
          <text:p text:style-name="P12">Dashboards </text:p>
        </text:list-item>
      </text:list>
      <text:h text:style-name="Heading_20_2" text:outline-level="2">Utilizar RxJS solamente para:</text:h>
      <text:list text:style-name="L6">
        <text:list-item>
          <text:p text:style-name="P13">HttpClient </text:p>
        </text:list-item>
        <text:list-item>
          <text:p text:style-name="P13">WebSockets </text:p>
        </text:list-item>
        <text:list-item>
          <text:p text:style-name="P14">Streams complejos </text:p>
        </text:list-item>
      </text:list>
      <text:p text:style-name="Horizontal_20_Line"/>
      <text:h text:style-name="Heading_20_1" text:outline-level="1">12. Angular 21: Características Nuevas</text:h>
      <text:p text:style-name="Text_20_body">Angular 21 representa uno de los cambios más importantes desde la llegada de Signals. </text:p>
      <text:p text:style-name="Horizontal_20_Line"/>
      <text:h text:style-name="Heading_20_2" text:outline-level="2">12.1 Zoneless por Defecto</text:h>
      <text:p text:style-name="Text_20_body">Angular ya no depende de Zone.js como mecanismo principal de detección de cambios. </text:p>
      <text:p text:style-name="Text_20_body">Beneficios:</text:p>
      <text:list text:style-name="L7">
        <text:list-item>
          <text:p text:style-name="P15">Menor consumo de memoria. </text:p>
        </text:list-item>
        <text:list-item>
          <text:p text:style-name="P15">Menor tamaño de bundle. </text:p>
        </text:list-item>
        <text:list-item>
          <text:p text:style-name="P15">Mejor rendimiento. </text:p>
        </text:list-item>
        <text:list-item>
          <text:p text:style-name="P15">Mejor debugging. </text:p>
        </text:list-item>
        <text:list-item>
          <text:p text:style-name="P16">Mejor Core Web Vitals. </text:p>
        </text:list-item>
      </text:list>
      <text:p text:style-name="Horizontal_20_Line"/>
      <text:h text:style-name="Heading_20_2" text:outline-level="2">12.2 Signal Forms</text:h>
      <text:p text:style-name="Text_20_body">Nuevo enfoque para formularios basado en Signals. </text:p>
      <text:p text:style-name="Text_20_body">Beneficios:</text:p>
      <text:list text:style-name="L8">
        <text:list-item>
          <text:p text:style-name="P17">Menos boilerplate. </text:p>
        </text:list-item>
        <text:list-item>
          <text:p text:style-name="P17">Mejor tipado. </text:p>
        </text:list-item>
        <text:list-item>
          <text:p text:style-name="P17">Más rendimiento. </text:p>
        </text:list-item>
        <text:list-item>
          <text:p text:style-name="P18"><text:soft-page-break/>Menos dependencia de RxJS. </text:p>
        </text:list-item>
      </text:list>
      <text:p text:style-name="Horizontal_20_Line"/>
      <text:h text:style-name="Heading_20_2" text:outline-level="2">12.3 Vitest como Testing Runner</text:h>
      <text:p text:style-name="Text_20_body">Angular 21 adopta Vitest como entorno moderno de pruebas. </text:p>
      <text:p text:style-name="Text_20_body">Ventajas:</text:p>
      <text:list text:style-name="L9">
        <text:list-item>
          <text:p text:style-name="P19">Más rápido. </text:p>
        </text:list-item>
        <text:list-item>
          <text:p text:style-name="P19">Menor consumo. </text:p>
        </text:list-item>
        <text:list-item>
          <text:p text:style-name="P20">Mejor integración con Vite. </text:p>
        </text:list-item>
      </text:list>
      <text:p text:style-name="Horizontal_20_Line"/>
      <text:h text:style-name="Heading_20_2" text:outline-level="2">12.4 Angular Aria</text:h>
      <text:p text:style-name="Text_20_body">Nuevo paquete:</text:p>
      <text:section text:style-name="Sect1" text:name="Sección17">
        <text:p text:style-name="P21"><text:bookmark text:name="code-block-viewer Copia 16"/><text:span text:style-name="Source_20_Text">@angular/aria</text:span></text:p>
      </text:section>
      <text:p text:style-name="Text_20_body">Permite construir componentes accesibles desde el inicio. </text:p>
      <text:p text:style-name="Horizontal_20_Line"/>
      <text:h text:style-name="Heading_20_2" text:outline-level="2">12.5 Control Flow Moderno</text:h>
      <text:p text:style-name="Text_20_body">Se reemplazan gradualmente:</text:p>
      <text:section text:style-name="Sect1" text:name="Sección18">
        <text:p text:style-name="P5"><text:bookmark text:name="code-block-viewer Copia 17"/><text:span text:style-name="Source_20_Text">*ngIf</text:span></text:p>
        <text:p text:style-name="P6"><text:span text:style-name="Source_20_Text">*ngFor</text:span></text:p>
      </text:section>
      <text:p text:style-name="Text_20_body">por:</text:p>
      <text:section text:style-name="Sect1" text:name="Sección19">
        <text:p text:style-name="P5"><text:bookmark text:name="code-block-viewer Copia 18"/><text:span text:style-name="Source_20_Text">@if()</text:span></text:p>
        <text:p text:style-name="Preformatted_20_Text"><text:span text:style-name="Source_20_Text">@for()</text:span></text:p>
        <text:p text:style-name="P6"><text:span text:style-name="Source_20_Text">@switch()</text:span></text:p>
      </text:section>
      <text:p text:style-name="Horizontal_20_Line"/>
      <text:h text:style-name="Heading_20_2" text:outline-level="2">12.6 Resource API</text:h>
      <text:p text:style-name="Text_20_body">Manejo de operaciones asíncronas mediante Signals. </text:p>
      <text:p text:style-name="Horizontal_20_Line"/>
      <text:h text:style-name="Heading_20_2" text:outline-level="2">12.7 Signal Inputs y Outputs</text:h>
      <text:section text:style-name="Sect1" text:name="Sección20">
        <text:p text:style-name="P5"><text:bookmark text:name="code-block-viewer Copia 19"/><text:span text:style-name="Source_20_Text">input()</text:span></text:p>
        <text:p text:style-name="P6"><text:span text:style-name="Source_20_Text">output()</text:span></text:p>
      </text:section>
      <text:p text:style-name="Text_20_body"><text:soft-page-break/>en lugar de:</text:p>
      <text:section text:style-name="Sect1" text:name="Sección21">
        <text:p text:style-name="P5"><text:bookmark text:name="code-block-viewer Copia 20"/><text:span text:style-name="Source_20_Text">@Input()</text:span></text:p>
        <text:p text:style-name="P6"><text:span text:style-name="Source_20_Text">@Output()</text:span></text:p>
      </text:section>
      <text:p text:style-name="Horizontal_20_Line"/>
      <text:h text:style-name="Heading_20_2" text:outline-level="2">12.8 Inject Function</text:h>
      <text:p text:style-name="Text_20_body">Preferir:</text:p>
      <text:section text:style-name="Sect1" text:name="Sección22">
        <text:p text:style-name="P21"><text:bookmark text:name="code-block-viewer Copia 21"/><text:span text:style-name="Source_20_Text">const service = inject(UserService);</text:span></text:p>
      </text:section>
      <text:p text:style-name="Text_20_body">sobre:</text:p>
      <text:section text:style-name="Sect1" text:name="Sección23">
        <text:p text:style-name="P5"><text:bookmark text:name="code-block-viewer Copia 22"/><text:span text:style-name="Source_20_Text">constructor(</text:span></text:p>
        <text:p text:style-name="Preformatted_20_Text"><text:span text:style-name="Source_20_Text"><text:s/>private userService: UserService</text:span></text:p>
        <text:p text:style-name="P6"><text:span text:style-name="Source_20_Text">){}</text:span></text:p>
      </text:section>
      <text:p text:style-name="Horizontal_20_Line"/>
      <text:h text:style-name="Heading_20_1" text:outline-level="1">13. Convenciones del Proyecto</text:h>
      <text:h text:style-name="Heading_20_2" text:outline-level="2">Componentes</text:h>
      <text:section text:style-name="Sect1" text:name="Sección24">
        <text:p text:style-name="P21"><text:bookmark text:name="code-block-viewer Copia 23"/><text:span text:style-name="Source_20_Text">user-list.component.ts</text:span></text:p>
      </text:section>
      <text:p text:style-name="Horizontal_20_Line"/>
      <text:h text:style-name="Heading_20_2" text:outline-level="2">Signals</text:h>
      <text:section text:style-name="Sect1" text:name="Sección25">
        <text:p text:style-name="P5"><text:bookmark text:name="code-block-viewer Copia 24"/><text:span text:style-name="Source_20_Text">usersSignal</text:span></text:p>
        <text:p text:style-name="P6"><text:span text:style-name="Source_20_Text">loadingSignal</text:span></text:p>
      </text:section>
      <text:p text:style-name="Horizontal_20_Line"/>
      <text:h text:style-name="Heading_20_2" text:outline-level="2">Use Cases</text:h>
      <text:section text:style-name="Sect1" text:name="Sección26">
        <text:p text:style-name="P5"><text:bookmark text:name="code-block-viewer Copia 25"/><text:span text:style-name="Source_20_Text">GetUsersUseCase</text:span></text:p>
        <text:p text:style-name="Preformatted_20_Text"><text:span text:style-name="Source_20_Text">CreateUserUseCase</text:span></text:p>
        <text:p text:style-name="P6"><text:span text:style-name="Source_20_Text">DeleteUserUseCase</text:span></text:p>
      </text:section>
      <text:p text:style-name="Horizontal_20_Line"/>
      <text:h text:style-name="Heading_20_2" text:outline-level="2">Repositories</text:h>
      <text:section text:style-name="Sect1" text:name="Sección27">
        <text:p text:style-name="P5"><text:bookmark text:name="code-block-viewer Copia 26"/><text:span text:style-name="Source_20_Text">UserRepository</text:span></text:p>
        <text:p text:style-name="P6"><text:span text:style-name="Source_20_Text">AuthRepository</text:span></text:p>
      </text:section>
      <text:p text:style-name="Horizontal_20_Line"/>
      <text:h text:style-name="Heading_20_1" text:outline-level="1"><text:soft-page-break/>14. Testing Strategy</text:h>
      <text:p text:style-name="Text_20_body">Se realizarán:</text:p>
      <text:h text:style-name="Heading_20_3" text:outline-level="3">Unit Tests</text:h>
      <text:list text:style-name="L10">
        <text:list-item>
          <text:p text:style-name="P22">Use Cases </text:p>
        </text:list-item>
        <text:list-item>
          <text:p text:style-name="P22">Repositories </text:p>
        </text:list-item>
        <text:list-item>
          <text:p text:style-name="P23">Services </text:p>
        </text:list-item>
      </text:list>
      <text:h text:style-name="Heading_20_3" text:outline-level="3">Component Tests</text:h>
      <text:list text:style-name="L11">
        <text:list-item>
          <text:p text:style-name="P24">Smart Components </text:p>
        </text:list-item>
      </text:list>
      <text:h text:style-name="Heading_20_3" text:outline-level="3">E2E</text:h>
      <text:list text:style-name="L12">
        <text:list-item>
          <text:p text:style-name="P25">Login </text:p>
        </text:list-item>
        <text:list-item>
          <text:p text:style-name="P25">Gestión usuarios </text:p>
        </text:list-item>
        <text:list-item>
          <text:p text:style-name="P25">Gestión contable </text:p>
        </text:list-item>
        <text:list-item>
          <text:p text:style-name="P26">Reportes </text:p>
        </text:list-item>
      </text:list>
      <text:p text:style-name="Horizontal_20_Line"/>
      <text:h text:style-name="Heading_20_1" text:outline-level="1">15. Tecnologías Seleccionada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Tecnología</text:p>
            </table:table-cell>
            <table:table-cell table:style-name="Tabla1.A1" office:value-type="string">
              <text:p text:style-name="Table_20_Heading">Uso</text:p>
            </table:table-cell>
          </table:table-row>
        </table:table-header-rows>
        <table:table-row>
          <table:table-cell table:style-name="Tabla1.A1" office:value-type="string">
            <text:p text:style-name="Table_20_Contents">Angular 21</text:p>
          </table:table-cell>
          <table:table-cell table:style-name="Tabla1.A1" office:value-type="string">
            <text:p text:style-name="Table_20_Contents">Framework</text:p>
          </table:table-cell>
        </table:table-row>
        <table:table-row>
          <table:table-cell table:style-name="Tabla1.A1" office:value-type="string">
            <text:p text:style-name="Table_20_Contents">Signals</text:p>
          </table:table-cell>
          <table:table-cell table:style-name="Tabla1.A1" office:value-type="string">
            <text:p text:style-name="Table_20_Contents">Estado</text:p>
          </table:table-cell>
        </table:table-row>
        <table:table-row>
          <table:table-cell table:style-name="Tabla1.A1" office:value-type="string">
            <text:p text:style-name="Table_20_Contents">Standalone Components</text:p>
          </table:table-cell>
          <table:table-cell table:style-name="Tabla1.A1" office:value-type="string">
            <text:p text:style-name="Table_20_Contents">Componentes</text:p>
          </table:table-cell>
        </table:table-row>
        <table:table-row>
          <table:table-cell table:style-name="Tabla1.A1" office:value-type="string">
            <text:p text:style-name="Table_20_Contents">Zoneless</text:p>
          </table:table-cell>
          <table:table-cell table:style-name="Tabla1.A1" office:value-type="string">
            <text:p text:style-name="Table_20_Contents">Change Detection</text:p>
          </table:table-cell>
        </table:table-row>
        <table:table-row>
          <table:table-cell table:style-name="Tabla1.A1" office:value-type="string">
            <text:p text:style-name="Table_20_Contents">Vitest</text:p>
          </table:table-cell>
          <table:table-cell table:style-name="Tabla1.A1" office:value-type="string">
            <text:p text:style-name="Table_20_Contents">Testing</text:p>
          </table:table-cell>
        </table:table-row>
        <table:table-row>
          <table:table-cell table:style-name="Tabla1.A1" office:value-type="string">
            <text:p text:style-name="Table_20_Contents">Angular Router</text:p>
          </table:table-cell>
          <table:table-cell table:style-name="Tabla1.A1" office:value-type="string">
            <text:p text:style-name="Table_20_Contents">Navegación</text:p>
          </table:table-cell>
        </table:table-row>
        <table:table-row>
          <table:table-cell table:style-name="Tabla1.A1" office:value-type="string">
            <text:p text:style-name="Table_20_Contents">HttpClient</text:p>
          </table:table-cell>
          <table:table-cell table:style-name="Tabla1.A1" office:value-type="string">
            <text:p text:style-name="Table_20_Contents">Comunicación API</text:p>
          </table:table-cell>
        </table:table-row>
        <table:table-row>
          <table:table-cell table:style-name="Tabla1.A1" office:value-type="string">
            <text:p text:style-name="Table_20_Contents">Tailwind CSS</text:p>
          </table:table-cell>
          <table:table-cell table:style-name="Tabla1.A1" office:value-type="string">
            <text:p text:style-name="Table_20_Contents">UI</text:p>
          </table:table-cell>
        </table:table-row>
        <table:table-row>
          <table:table-cell table:style-name="Tabla1.A1" office:value-type="string">
            <text:p text:style-name="Table_20_Contents">ESLint</text:p>
          </table:table-cell>
          <table:table-cell table:style-name="Tabla1.A1" office:value-type="string">
            <text:p text:style-name="Table_20_Contents">Calidad</text:p>
          </table:table-cell>
        </table:table-row>
        <table:table-row>
          <table:table-cell table:style-name="Tabla1.A1" office:value-type="string">
            <text:p text:style-name="Table_20_Contents">Prettier</text:p>
          </table:table-cell>
          <table:table-cell table:style-name="Tabla1.A1" office:value-type="string">
            <text:p text:style-name="Table_20_Contents">Formateo</text:p>
          </table:table-cell>
        </table:table-row>
      </table:table>
      <text:p text:style-name="Horizontal_20_Line"/>
      <text:h text:style-name="Heading_20_1" text:outline-level="1">16. Decisión Arquitectónica Final</text:h>
      <text:p text:style-name="Text_20_body">Para Pérgamo se adopta:</text:p>
      <text:list text:style-name="L13">
        <text:list-item>
          <text:p text:style-name="P27">Arquitectura Hexagonal. </text:p>
        </text:list-item>
        <text:list-item>
          <text:p text:style-name="P27">Domain Driven Design ligero. </text:p>
        </text:list-item>
        <text:list-item>
          <text:p text:style-name="P27">Signal First. </text:p>
        </text:list-item>
        <text:list-item>
          <text:p text:style-name="P27"><text:soft-page-break/>Zoneless. </text:p>
        </text:list-item>
        <text:list-item>
          <text:p text:style-name="P27">Standalone Components. </text:p>
        </text:list-item>
        <text:list-item>
          <text:p text:style-name="P27">Feature Based Structure. </text:p>
        </text:list-item>
        <text:list-item>
          <text:p text:style-name="P27">Casos de Uso por funcionalidad. </text:p>
        </text:list-item>
        <text:list-item>
          <text:p text:style-name="P27">Repositorios mediante Puertos y Adaptadores. </text:p>
        </text:list-item>
        <text:list-item>
          <text:p text:style-name="P27">Vitest para pruebas. </text:p>
        </text:list-item>
        <text:list-item>
          <text:p text:style-name="P28">Angular 21 como base tecnológica. </text:p>
        </text:list-item>
      </text:list>
      <text:p text:style-name="Text_20_body">Esta arquitectura permitirá que el sistema crezca durante años sin depender de Angular como núcleo de negocio, facilitando mantenimiento, pruebas, evolución tecnológica y escalabilidad empresaria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5T18:23:11.319869362</meta:creation-date>
    <dc:date>2026-06-15T18:26:29.766085634</dc:date>
    <meta:editing-duration>PT3M19S</meta:editing-duration>
    <meta:editing-cycles>1</meta:editing-cycles>
    <meta:document-statistic meta:table-count="1" meta:image-count="0" meta:object-count="0" meta:page-count="11" meta:paragraph-count="323" meta:word-count="863" meta:character-count="6026" meta:non-whitespace-character-count="5228"/>
    <meta:generator>LibreOffice/26.2.3.2$Linux_X86_64 LibreOffice_project/620$Build-2</meta:generator>
  </office:meta>
</office:document-meta>
</file>