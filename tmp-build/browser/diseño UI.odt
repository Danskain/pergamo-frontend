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Preformatted_20_Text">
      <style:paragraph-properties fo:margin-left="0cm" fo:margin-right="0cm" fo:text-indent="0cm" style:auto-text-indent="false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decisión. Para una <text:span text:style-name="Strong_20_Emphasis">IPS (Institución Prestadora de Servicios de Salud)</text:span> no te recomiendo un diseño "colorido tipo startup", sino un diseño que transmita:</text:p>
      <text:list text:style-name="L1">
        <text:list-item>
          <text:p text:style-name="P1">Confianza. </text:p>
        </text:list-item>
        <text:list-item>
          <text:p text:style-name="P1">Profesionalismo. </text:p>
        </text:list-item>
        <text:list-item>
          <text:p text:style-name="P1">Seguridad. </text:p>
        </text:list-item>
        <text:list-item>
          <text:p text:style-name="P1">Modernidad. </text:p>
        </text:list-item>
        <text:list-item>
          <text:p text:style-name="P1">Estabilidad. </text:p>
        </text:list-item>
        <text:list-item>
          <text:p text:style-name="P2">Tecnología. </text:p>
        </text:list-item>
      </text:list>
      <text:p text:style-name="Text_20_body">Piensa en sistemas como:</text:p>
      <text:list text:style-name="L2">
        <text:list-item>
          <text:p text:style-name="P3">SAP </text:p>
        </text:list-item>
        <text:list-item>
          <text:p text:style-name="P3">Oracle </text:p>
        </text:list-item>
        <text:list-item>
          <text:p text:style-name="P3">Salesforce </text:p>
        </text:list-item>
        <text:list-item>
          <text:p text:style-name="P3">Epic Systems </text:p>
        </text:list-item>
        <text:list-item>
          <text:p text:style-name="P4">Cerner </text:p>
        </text:list-item>
      </text:list>
      <text:p text:style-name="Text_20_body">No son llamativos, pero generan mucha confianza visual.</text:p>
      <text:p text:style-name="Horizontal_20_Line"/>
      <text:h text:style-name="Heading_20_1" text:outline-level="1">DOCUMENTO DE DISEÑO UI/UX</text:h>
      <text:h text:style-name="Heading_20_1" text:outline-level="1">Proyecto Pérgamo IPS</text:h>
      <text:h text:style-name="Heading_20_2" text:outline-level="2">Angular 21 + Arquitectura Hexagonal</text:h>
      <text:p text:style-name="Horizontal_20_Line"/>
      <text:h text:style-name="Heading_20_1" text:outline-level="1">1. Filosofía de Diseño</text:h>
      <text:p text:style-name="Text_20_body">Pérgamo será una plataforma empresarial para el sector salud.</text:p>
      <text:p text:style-name="Text_20_body">Por lo tanto el diseño deberá transmitir:</text:p>
      <text:h text:style-name="Heading_20_3" text:outline-level="3">Profesionalismo</text:h>
      <text:p text:style-name="Text_20_body">El usuario debe sentir que está utilizando una plataforma robusta y segura.</text:p>
      <text:h text:style-name="Heading_20_3" text:outline-level="3">Claridad</text:h>
      <text:p text:style-name="Text_20_body">La información médica debe visualizarse rápidamente.</text:p>
      <text:h text:style-name="Heading_20_3" text:outline-level="3"><text:soft-page-break/>Accesibilidad</text:h>
      <text:p text:style-name="Text_20_body">El sistema debe ser fácil de utilizar por:</text:p>
      <text:list text:style-name="L3">
        <text:list-item>
          <text:p text:style-name="P5">Médicos </text:p>
        </text:list-item>
        <text:list-item>
          <text:p text:style-name="P5">Enfermeras </text:p>
        </text:list-item>
        <text:list-item>
          <text:p text:style-name="P5">Administrativos </text:p>
        </text:list-item>
        <text:list-item>
          <text:p text:style-name="P5">Facturación </text:p>
        </text:list-item>
        <text:list-item>
          <text:p text:style-name="P5">Auditoría </text:p>
        </text:list-item>
        <text:list-item>
          <text:p text:style-name="P6">Talento Humano </text:p>
        </text:list-item>
      </text:list>
      <text:h text:style-name="Heading_20_3" text:outline-level="3">Rendimiento</text:h>
      <text:p text:style-name="Text_20_body">Las animaciones no deben afectar la productividad.</text:p>
      <text:p text:style-name="Horizontal_20_Line"/>
      <text:h text:style-name="Heading_20_1" text:outline-level="1">2. Estilo Visual Seleccionado</text:h>
      <text:p text:style-name="Text_20_body">Se adopta un estilo:</text:p>
      <text:h text:style-name="Heading_20_2" text:outline-level="2">Modern Enterprise Healthcare</text:h>
      <text:p text:style-name="Text_20_body">Inspirado en:</text:p>
      <text:section text:style-name="Sect1" text:name="code-block-viewer">
        <text:p text:style-name="P7"><text:span text:style-name="Source_20_Text">Epic Systems</text:span></text:p>
        <text:p text:style-name="Preformatted_20_Text"><text:span text:style-name="Source_20_Text">Cerner</text:span></text:p>
        <text:p text:style-name="Preformatted_20_Text"><text:span text:style-name="Source_20_Text">Microsoft Fluent</text:span></text:p>
        <text:p text:style-name="Preformatted_20_Text"><text:span text:style-name="Source_20_Text">SAP Fiori</text:span></text:p>
        <text:p text:style-name="P8"><text:span text:style-name="Source_20_Text">Material 3</text:span></text:p>
      </text:section>
      <text:p text:style-name="Horizontal_20_Line"/>
      <text:h text:style-name="Heading_20_1" text:outline-level="1">3. Paleta de Colores</text:h>
      <text:h text:style-name="Heading_20_2" text:outline-level="2">Color Principal</text:h>
      <text:p text:style-name="Text_20_body">Azul institucional.</text:p>
      <text:section text:style-name="Sect1" text:name="Sección1">
        <text:p text:style-name="P9"><text:bookmark text:name="code-block-viewer"/><text:span text:style-name="Source_20_Text">--primary: #0F4C81;</text:span></text:p>
      </text:section>
      <text:p text:style-name="Text_20_body">Representa:</text:p>
      <text:list text:style-name="L4">
        <text:list-item>
          <text:p text:style-name="P10">Confianza </text:p>
        </text:list-item>
        <text:list-item>
          <text:p text:style-name="P10">Salud </text:p>
        </text:list-item>
        <text:list-item>
          <text:p text:style-name="P10">Seguridad </text:p>
        </text:list-item>
        <text:list-item>
          <text:p text:style-name="P11">Profesionalismo </text:p>
        </text:list-item>
      </text:list>
      <text:p text:style-name="Horizontal_20_Line"/>
      <text:h text:style-name="Heading_20_2" text:outline-level="2"><text:soft-page-break/>Color Secundario</text:h>
      <text:p text:style-name="Text_20_body">Azul claro.</text:p>
      <text:section text:style-name="Sect1" text:name="Sección2">
        <text:p text:style-name="P9"><text:bookmark text:name="code-block-viewer Copia 1"/><text:span text:style-name="Source_20_Text">--secondary: #2D9CDB;</text:span></text:p>
      </text:section>
      <text:p text:style-name="Text_20_body">Representa:</text:p>
      <text:list text:style-name="L5">
        <text:list-item>
          <text:p text:style-name="P12">Tecnología </text:p>
        </text:list-item>
        <text:list-item>
          <text:p text:style-name="P12">Innovación </text:p>
        </text:list-item>
        <text:list-item>
          <text:p text:style-name="P13">Modernidad </text:p>
        </text:list-item>
      </text:list>
      <text:p text:style-name="Horizontal_20_Line"/>
      <text:h text:style-name="Heading_20_2" text:outline-level="2">Color de Éxito</text:h>
      <text:section text:style-name="Sect1" text:name="Sección3">
        <text:p text:style-name="P9"><text:bookmark text:name="code-block-viewer Copia 2"/><text:span text:style-name="Source_20_Text">--success: #27AE60;</text:span></text:p>
      </text:section>
      <text:p text:style-name="Text_20_body">Utilizado para:</text:p>
      <text:list text:style-name="L6">
        <text:list-item>
          <text:p text:style-name="P14">Citas confirmadas </text:p>
        </text:list-item>
        <text:list-item>
          <text:p text:style-name="P14">Facturas pagadas </text:p>
        </text:list-item>
        <text:list-item>
          <text:p text:style-name="P15">Procesos exitosos </text:p>
        </text:list-item>
      </text:list>
      <text:p text:style-name="Horizontal_20_Line"/>
      <text:h text:style-name="Heading_20_2" text:outline-level="2">Advertencia</text:h>
      <text:section text:style-name="Sect1" text:name="Sección4">
        <text:p text:style-name="P9"><text:bookmark text:name="code-block-viewer Copia 3"/><text:span text:style-name="Source_20_Text">--warning: #F2C94C;</text:span></text:p>
      </text:section>
      <text:p text:style-name="Text_20_body">Utilizado para:</text:p>
      <text:list text:style-name="L7">
        <text:list-item>
          <text:p text:style-name="P16">Pendientes </text:p>
        </text:list-item>
        <text:list-item>
          <text:p text:style-name="P17">Validaciones </text:p>
        </text:list-item>
      </text:list>
      <text:p text:style-name="Horizontal_20_Line"/>
      <text:h text:style-name="Heading_20_2" text:outline-level="2">Error</text:h>
      <text:section text:style-name="Sect1" text:name="Sección5">
        <text:p text:style-name="P9"><text:bookmark text:name="code-block-viewer Copia 4"/><text:span text:style-name="Source_20_Text">--danger: #EB5757;</text:span></text:p>
      </text:section>
      <text:p text:style-name="Text_20_body">Utilizado para:</text:p>
      <text:list text:style-name="L8">
        <text:list-item>
          <text:p text:style-name="P18">Alertas </text:p>
        </text:list-item>
        <text:list-item>
          <text:p text:style-name="P18">Errores médicos </text:p>
        </text:list-item>
        <text:list-item>
          <text:p text:style-name="P19">Datos incompletos </text:p>
        </text:list-item>
      </text:list>
      <text:p text:style-name="Horizontal_20_Line"/>
      <text:h text:style-name="Heading_20_1" text:outline-level="1"><text:soft-page-break/>4. Escala de Grises</text:h>
      <text:section text:style-name="Sect1" text:name="Sección6">
        <text:p text:style-name="P7"><text:bookmark text:name="code-block-viewer Copia 5"/><text:span text:style-name="Source_20_Text">--gray-50: #F9FAFB;</text:span></text:p>
        <text:p text:style-name="Preformatted_20_Text"><text:span text:style-name="Source_20_Text">--gray-100: #F3F4F6;</text:span></text:p>
        <text:p text:style-name="Preformatted_20_Text"><text:span text:style-name="Source_20_Text">--gray-200: #E5E7EB;</text:span></text:p>
        <text:p text:style-name="Preformatted_20_Text"><text:span text:style-name="Source_20_Text">--gray-300: #D1D5DB;</text:span></text:p>
        <text:p text:style-name="Preformatted_20_Text"><text:span text:style-name="Source_20_Text">--gray-500: #6B7280;</text:span></text:p>
        <text:p text:style-name="Preformatted_20_Text"><text:span text:style-name="Source_20_Text">--gray-700: #374151;</text:span></text:p>
        <text:p text:style-name="P8"><text:span text:style-name="Source_20_Text">--gray-900: #111827;</text:span></text:p>
      </text:section>
      <text:p text:style-name="Horizontal_20_Line"/>
      <text:h text:style-name="Heading_20_1" text:outline-level="1">5. Layout Principal</text:h>
      <text:section text:style-name="Sect1" text:name="Sección7">
        <text:p text:style-name="P7"><text:bookmark text:name="code-block-viewer Copia 6"/><text:span text:style-name="Source_20_Text">┌──────────────────────────────────────┐</text:span></text:p>
        <text:p text:style-name="Preformatted_20_Text"><text:span text:style-name="Source_20_Text">│ <text:s text:c="13"/>TOP BAR <text:s text:c="16"/>│</text:span></text:p>
        <text:p text:style-name="Preformatted_20_Text"><text:span text:style-name="Source_20_Text">├───────────────┬──────────────────────┤</text:span></text:p>
        <text:p text:style-name="Preformatted_20_Text"><text:span text:style-name="Source_20_Text">│ <text:s text:c="14"/>│ <text:s text:c="21"/>│</text:span></text:p>
        <text:p text:style-name="Preformatted_20_Text"><text:span text:style-name="Source_20_Text">│ <text:s text:c="2"/>SIDEBAR <text:s text:c="4"/>│ <text:s text:c="5"/>CONTENIDO <text:s text:c="6"/>│</text:span></text:p>
        <text:p text:style-name="Preformatted_20_Text"><text:span text:style-name="Source_20_Text">│ <text:s text:c="14"/>│ <text:s text:c="21"/>│</text:span></text:p>
        <text:p text:style-name="Preformatted_20_Text"><text:span text:style-name="Source_20_Text">├───────────────┴──────────────────────┤</text:span></text:p>
        <text:p text:style-name="Preformatted_20_Text"><text:span text:style-name="Source_20_Text">│ <text:s text:c="14"/>FOOTER <text:s text:c="16"/>│</text:span></text:p>
        <text:p text:style-name="P8"><text:span text:style-name="Source_20_Text">└──────────────────────────────────────┘</text:span></text:p>
      </text:section>
      <text:p text:style-name="Horizontal_20_Line"/>
      <text:h text:style-name="Heading_20_1" text:outline-level="1">6. Top Bar</text:h>
      <text:p text:style-name="Text_20_body">Altura:</text:p>
      <text:section text:style-name="Sect1" text:name="Sección8">
        <text:p text:style-name="P9"><text:bookmark text:name="code-block-viewer Copia 7"/><text:span text:style-name="Source_20_Text">72px</text:span></text:p>
      </text:section>
      <text:p text:style-name="Text_20_body">Color:</text:p>
      <text:section text:style-name="Sect1" text:name="Sección9">
        <text:p text:style-name="P9"><text:bookmark text:name="code-block-viewer Copia 8"/><text:span text:style-name="Source_20_Text">#FFFFFF</text:span></text:p>
      </text:section>
      <text:p text:style-name="Text_20_body">Sombra:</text:p>
      <text:section text:style-name="Sect1" text:name="Sección10">
        <text:p text:style-name="P7"><text:bookmark text:name="code-block-viewer Copia 9"/><text:span text:style-name="Source_20_Text">box-shadow:</text:span></text:p>
        <text:p text:style-name="P8"><text:span text:style-name="Source_20_Text">0 2px 8px rgba(0,0,0,.05);</text:span></text:p>
      </text:section>
      <text:p text:style-name="Text_20_body">Contenido:</text:p>
      <text:section text:style-name="Sect1" text:name="Sección11">
        <text:p text:style-name="P7"><text:bookmark text:name="code-block-viewer Copia 10"/><text:span text:style-name="Source_20_Text">Logo</text:span></text:p>
        <text:p text:style-name="Preformatted_20_Text"><text:span text:style-name="Source_20_Text">Buscador global</text:span></text:p>
        <text:p text:style-name="Preformatted_20_Text"><text:span text:style-name="Source_20_Text">Notificaciones</text:span></text:p>
        <text:p text:style-name="Preformatted_20_Text"><text:span text:style-name="Source_20_Text">Usuario</text:span></text:p>
        <text:p text:style-name="P8"><text:span text:style-name="Source_20_Text">Configuración</text:span></text:p>
      </text:section>
      <text:p text:style-name="Horizontal_20_Line"/>
      <text:h text:style-name="Heading_20_1" text:outline-level="1"><text:soft-page-break/>7. Sidebar</text:h>
      <text:p text:style-name="Text_20_body">Ancho expandido:</text:p>
      <text:section text:style-name="Sect1" text:name="Sección12">
        <text:p text:style-name="P9"><text:bookmark text:name="code-block-viewer Copia 11"/><text:span text:style-name="Source_20_Text">280px</text:span></text:p>
      </text:section>
      <text:p text:style-name="Text_20_body">Ancho colapsado:</text:p>
      <text:section text:style-name="Sect1" text:name="Sección13">
        <text:p text:style-name="P9"><text:bookmark text:name="code-block-viewer Copia 12"/><text:span text:style-name="Source_20_Text">80px</text:span></text:p>
      </text:section>
      <text:p text:style-name="Text_20_body">Color:</text:p>
      <text:section text:style-name="Sect1" text:name="Sección14">
        <text:p text:style-name="P9"><text:bookmark text:name="code-block-viewer Copia 13"/><text:span text:style-name="Source_20_Text">#0F172A</text:span></text:p>
      </text:section>
      <text:p text:style-name="Text_20_body">Texto:</text:p>
      <text:section text:style-name="Sect1" text:name="Sección15">
        <text:p text:style-name="P9"><text:bookmark text:name="code-block-viewer Copia 14"/><text:span text:style-name="Source_20_Text">#E2E8F0</text:span></text:p>
      </text:section>
      <text:p text:style-name="Horizontal_20_Line"/>
      <text:h text:style-name="Heading_20_1" text:outline-level="1">Sidebar moderno</text:h>
      <text:section text:style-name="Sect1" text:name="Sección16">
        <text:p text:style-name="P7"><text:bookmark text:name="code-block-viewer Copia 15"/><text:span text:style-name="Source_20_Text">Dashboard</text:span></text:p>
        <text:p text:style-name="Preformatted_20_Text"><text:span text:style-name="Source_20_Text">Administración</text:span></text:p>
        <text:p text:style-name="Preformatted_20_Text"><text:span text:style-name="Source_20_Text">Pacientes</text:span></text:p>
        <text:p text:style-name="Preformatted_20_Text"><text:span text:style-name="Source_20_Text">Historias Clínicas</text:span></text:p>
        <text:p text:style-name="Preformatted_20_Text"><text:span text:style-name="Source_20_Text">Citas</text:span></text:p>
        <text:p text:style-name="Preformatted_20_Text"><text:span text:style-name="Source_20_Text">Facturación</text:span></text:p>
        <text:p text:style-name="Preformatted_20_Text"><text:span text:style-name="Source_20_Text">Reportes</text:span></text:p>
        <text:p text:style-name="P8"><text:span text:style-name="Source_20_Text">Configuración</text:span></text:p>
      </text:section>
      <text:p text:style-name="Horizontal_20_Line"/>
      <text:h text:style-name="Heading_20_1" text:outline-level="1">8. Cards</text:h>
      <text:p text:style-name="Text_20_body">Todas las vistas deberán utilizar Cards.</text:p>
      <text:p text:style-name="Text_20_body">Ejemplo:</text:p>
      <text:section text:style-name="Sect1" text:name="Sección17">
        <text:p text:style-name="P7"><text:bookmark text:name="code-block-viewer Copia 16"/><text:span text:style-name="Source_20_Text">┌────────────────────┐</text:span></text:p>
        <text:p text:style-name="Preformatted_20_Text"><text:span text:style-name="Source_20_Text">│ Total Pacientes <text:s text:c="3"/>│</text:span></text:p>
        <text:p text:style-name="Preformatted_20_Text"><text:span text:style-name="Source_20_Text">│ <text:s text:c="19"/>│</text:span></text:p>
        <text:p text:style-name="Preformatted_20_Text"><text:span text:style-name="Source_20_Text">│ 12.354 <text:s text:c="12"/>│</text:span></text:p>
        <text:p text:style-name="P8"><text:span text:style-name="Source_20_Text">└────────────────────┘</text:span></text:p>
      </text:section>
      <text:p text:style-name="Horizontal_20_Line"/>
      <text:p text:style-name="Text_20_body">Estilos:</text:p>
      <text:section text:style-name="Sect1" text:name="Sección18">
        <text:p text:style-name="P7"><text:bookmark text:name="code-block-viewer Copia 17"/><text:span text:style-name="Source_20_Text">border-radius: 16px;</text:span></text:p>
        <text:p text:style-name="Preformatted_20_Text"><text:span text:style-name="Source_20_Text">box-shadow:</text:span></text:p>
        <text:p text:style-name="P8"><text:span text:style-name="Source_20_Text">0 4px 12px rgba(0,0,0,.05);</text:span></text:p>
      </text:section>
      <text:p text:style-name="Horizontal_20_Line"><text:soft-page-break/></text:p>
      <text:h text:style-name="Heading_20_1" text:outline-level="1">9. Tablas Empresariales</text:h>
      <text:p text:style-name="Text_20_body">Características obligatorias:</text:p>
      <text:list text:style-name="L9">
        <text:list-item>
          <text:p text:style-name="P20">Sticky Header </text:p>
        </text:list-item>
        <text:list-item>
          <text:p text:style-name="P20">Paginación </text:p>
        </text:list-item>
        <text:list-item>
          <text:p text:style-name="P20">Ordenamiento </text:p>
        </text:list-item>
        <text:list-item>
          <text:p text:style-name="P20">Filtros </text:p>
        </text:list-item>
        <text:list-item>
          <text:p text:style-name="P20">Exportar Excel </text:p>
        </text:list-item>
        <text:list-item>
          <text:p text:style-name="P20">Exportar PDF </text:p>
        </text:list-item>
        <text:list-item>
          <text:p text:style-name="P21">Responsive </text:p>
        </text:list-item>
      </text:list>
      <text:p text:style-name="Horizontal_20_Line"/>
      <text:h text:style-name="Heading_20_1" text:outline-level="1">10. Sistema de Espaciado</text:h>
      <text:p text:style-name="Text_20_body">Utilizar múltiplos de 8.</text:p>
      <text:section text:style-name="Sect1" text:name="Sección19">
        <text:p text:style-name="P7"><text:bookmark text:name="code-block-viewer Copia 18"/><text:span text:style-name="Source_20_Text">8px</text:span></text:p>
        <text:p text:style-name="Preformatted_20_Text"><text:span text:style-name="Source_20_Text">16px</text:span></text:p>
        <text:p text:style-name="Preformatted_20_Text"><text:span text:style-name="Source_20_Text">24px</text:span></text:p>
        <text:p text:style-name="Preformatted_20_Text"><text:span text:style-name="Source_20_Text">32px</text:span></text:p>
        <text:p text:style-name="Preformatted_20_Text"><text:span text:style-name="Source_20_Text">40px</text:span></text:p>
        <text:p text:style-name="P8"><text:span text:style-name="Source_20_Text">48px</text:span></text:p>
      </text:section>
      <text:p text:style-name="Horizontal_20_Line"/>
      <text:h text:style-name="Heading_20_1" text:outline-level="1">11. Tipografía</text:h>
      <text:p text:style-name="Text_20_body">Recomendada:</text:p>
      <text:section text:style-name="Sect1" text:name="Sección20">
        <text:p text:style-name="P9"><text:bookmark text:name="code-block-viewer Copia 19"/><text:span text:style-name="Source_20_Text">Inter</text:span></text:p>
      </text:section>
      <text:p text:style-name="Text_20_body">porque:</text:p>
      <text:list text:style-name="L10">
        <text:list-item>
          <text:p text:style-name="P22">Excelente legibilidad. </text:p>
        </text:list-item>
        <text:list-item>
          <text:p text:style-name="P22">Moderna. </text:p>
        </text:list-item>
        <text:list-item>
          <text:p text:style-name="P23">Muy usada en sistemas empresariales. </text:p>
        </text:list-item>
      </text:list>
      <text:p text:style-name="Horizontal_20_Line"/>
      <text:p text:style-name="Text_20_body">Tamaños:</text:p>
      <text:section text:style-name="Sect1" text:name="Sección21">
        <text:p text:style-name="P7"><text:bookmark text:name="code-block-viewer Copia 20"/><text:span text:style-name="Source_20_Text">12px</text:span></text:p>
        <text:p text:style-name="Preformatted_20_Text"><text:span text:style-name="Source_20_Text">14px</text:span></text:p>
        <text:p text:style-name="Preformatted_20_Text"><text:span text:style-name="Source_20_Text">16px</text:span></text:p>
        <text:p text:style-name="Preformatted_20_Text"><text:span text:style-name="Source_20_Text">18px</text:span></text:p>
        <text:p text:style-name="Preformatted_20_Text"><text:span text:style-name="Source_20_Text">24px</text:span></text:p>
        <text:p text:style-name="P8"><text:soft-page-break/><text:span text:style-name="Source_20_Text">32px</text:span></text:p>
      </text:section>
      <text:p text:style-name="Horizontal_20_Line"/>
      <text:h text:style-name="Heading_20_1" text:outline-level="1">12. Animaciones</text:h>
      <text:p text:style-name="Text_20_body">Aquí es donde puedes darle personalidad al sistema.</text:p>
      <text:p text:style-name="Text_20_body">La regla es:</text:p>
      <text:p text:style-name="Quotations">Las animaciones deben mejorar la experiencia, nunca distraer.</text:p>
      <text:p text:style-name="Horizontal_20_Line"/>
      <text:h text:style-name="Heading_20_1" text:outline-level="1">Animaciones Permitidas</text:h>
      <text:h text:style-name="Heading_20_2" text:outline-level="2">Hover Menú</text:h>
      <text:section text:style-name="Sect1" text:name="Sección22">
        <text:p text:style-name="P9"><text:bookmark text:name="code-block-viewer Copia 21"/><text:span text:style-name="Source_20_Text">transition: .2s ease;</text:span></text:p>
      </text:section>
      <text:section text:style-name="Sect1" text:name="Sección23">
        <text:p text:style-name="P9"><text:bookmark text:name="code-block-viewer Copia 22"/><text:span text:style-name="Source_20_Text">Normal → Hover</text:span></text:p>
      </text:section>
      <text:p text:style-name="Horizontal_20_Line"/>
      <text:h text:style-name="Heading_20_2" text:outline-level="2">Apertura Sidebar</text:h>
      <text:section text:style-name="Sect1" text:name="Sección24">
        <text:p text:style-name="P9"><text:bookmark text:name="code-block-viewer Copia 23"/><text:span text:style-name="Source_20_Text">300ms</text:span></text:p>
      </text:section>
      <text:section text:style-name="Sect1" text:name="Sección25">
        <text:p text:style-name="P9"><text:bookmark text:name="code-block-viewer Copia 24"/><text:span text:style-name="Source_20_Text">280px → 80px</text:span></text:p>
      </text:section>
      <text:p text:style-name="Text_20_body">Suave.</text:p>
      <text:p text:style-name="Horizontal_20_Line"/>
      <text:h text:style-name="Heading_20_2" text:outline-level="2">Cambio de Página</text:h>
      <text:section text:style-name="Sect1" text:name="Sección26">
        <text:p text:style-name="P9"><text:bookmark text:name="code-block-viewer Copia 25"/><text:span text:style-name="Source_20_Text">250ms</text:span></text:p>
      </text:section>
      <text:p text:style-name="Text_20_body">Tipo:</text:p>
      <text:section text:style-name="Sect1" text:name="Sección27">
        <text:p text:style-name="P9"><text:bookmark text:name="code-block-viewer Copia 26"/><text:span text:style-name="Source_20_Text">Fade In</text:span></text:p>
      </text:section>
      <text:p text:style-name="Horizontal_20_Line"/>
      <text:h text:style-name="Heading_20_2" text:outline-level="2">Cards</text:h>
      <text:section text:style-name="Sect1" text:name="Sección28">
        <text:p text:style-name="P7"><text:bookmark text:name="code-block-viewer Copia 27"/><text:span text:style-name="Source_20_Text">Opacity</text:span></text:p>
        <text:p text:style-name="P8"><text:span text:style-name="Source_20_Text">TranslateY</text:span></text:p>
      </text:section>
      <text:p text:style-name="Text_20_body"><text:soft-page-break/>Ejemplo:</text:p>
      <text:section text:style-name="Sect1" text:name="Sección29">
        <text:p text:style-name="P7"><text:bookmark text:name="code-block-viewer Copia 28"/><text:span text:style-name="Source_20_Text">opacity: 0;</text:span></text:p>
        <text:p text:style-name="P8"><text:span text:style-name="Source_20_Text">transform: translateY(10px);</text:span></text:p>
      </text:section>
      <text:p text:style-name="Horizontal_20_Line"/>
      <text:p text:style-name="Text_20_body">Resultado:</text:p>
      <text:section text:style-name="Sect1" text:name="Sección30">
        <text:p text:style-name="P9"><text:bookmark text:name="code-block-viewer Copia 29"/><text:span text:style-name="Source_20_Text">La card aparece suavemente.</text:span></text:p>
      </text:section>
      <text:p text:style-name="Horizontal_20_Line"/>
      <text:h text:style-name="Heading_20_2" text:outline-level="2">Dialogs</text:h>
      <text:section text:style-name="Sect1" text:name="Sección31">
        <text:p text:style-name="P9"><text:bookmark text:name="code-block-viewer Copia 30"/><text:span text:style-name="Source_20_Text">Scale + Fade</text:span></text:p>
      </text:section>
      <text:section text:style-name="Sect1" text:name="Sección32">
        <text:p text:style-name="P7"><text:bookmark text:name="code-block-viewer Copia 31"/><text:span text:style-name="Source_20_Text">transform: scale(.95);</text:span></text:p>
        <text:p text:style-name="P8"><text:span text:style-name="Source_20_Text">opacity: 0;</text:span></text:p>
      </text:section>
      <text:p text:style-name="Horizontal_20_Line"/>
      <text:h text:style-name="Heading_20_2" text:outline-level="2">Toasts</text:h>
      <text:section text:style-name="Sect1" text:name="Sección33">
        <text:p text:style-name="P9"><text:bookmark text:name="code-block-viewer Copia 32"/><text:span text:style-name="Source_20_Text">Slide Right</text:span></text:p>
      </text:section>
      <text:p text:style-name="Horizontal_20_Line"/>
      <text:h text:style-name="Heading_20_1" text:outline-level="1">Animaciones Prohibidas</text:h>
      <text:p text:style-name="Text_20_body">No utilizar:</text:p>
      <text:section text:style-name="Sect1" text:name="Sección34">
        <text:p text:style-name="P7"><text:bookmark text:name="code-block-viewer Copia 33"/><text:span text:style-name="Source_20_Text">Bounce</text:span></text:p>
        <text:p text:style-name="Preformatted_20_Text"><text:span text:style-name="Source_20_Text">Shake</text:span></text:p>
        <text:p text:style-name="Preformatted_20_Text"><text:span text:style-name="Source_20_Text">Flip</text:span></text:p>
        <text:p text:style-name="Preformatted_20_Text"><text:span text:style-name="Source_20_Text">Rotate</text:span></text:p>
        <text:p text:style-name="P8"><text:span text:style-name="Source_20_Text">Zoom excesivo</text:span></text:p>
      </text:section>
      <text:p text:style-name="Text_20_body">Porque rompen la estética empresarial.</text:p>
      <text:p text:style-name="Horizontal_20_Line"/>
      <text:h text:style-name="Heading_20_1" text:outline-level="1">13. Dark Mode</text:h>
      <text:p text:style-name="Text_20_body">Desde el inicio.</text:p>
      <text:p text:style-name="Text_20_body">Angular 21 + Signals facilita muchísimo esto.</text:p>
      <text:p text:style-name="Text_20_body">Temas:</text:p>
      <text:section text:style-name="Sect1" text:name="Sección35">
        <text:p text:style-name="P7"><text:bookmark text:name="code-block-viewer Copia 34"/><text:span text:style-name="Source_20_Text">Light</text:span></text:p>
        <text:p text:style-name="P8"><text:span text:style-name="Source_20_Text">Dark</text:span></text:p>
      </text:section>
      <text:p text:style-name="Horizontal_20_Line"><text:soft-page-break/></text:p>
      <text:h text:style-name="Heading_20_1" text:outline-level="1">Light</text:h>
      <text:section text:style-name="Sect1" text:name="Sección36">
        <text:p text:style-name="P7"><text:bookmark text:name="code-block-viewer Copia 35"/><text:span text:style-name="Source_20_Text">Background:</text:span></text:p>
        <text:p text:style-name="P8"><text:span text:style-name="Source_20_Text">#F8FAFC</text:span></text:p>
      </text:section>
      <text:p text:style-name="Horizontal_20_Line"/>
      <text:h text:style-name="Heading_20_1" text:outline-level="1">Dark</text:h>
      <text:section text:style-name="Sect1" text:name="Sección37">
        <text:p text:style-name="P7"><text:bookmark text:name="code-block-viewer Copia 36"/><text:span text:style-name="Source_20_Text">Background:</text:span></text:p>
        <text:p text:style-name="P8"><text:span text:style-name="Source_20_Text">#0F172A</text:span></text:p>
      </text:section>
      <text:p text:style-name="Horizontal_20_Line"/>
      <text:h text:style-name="Heading_20_1" text:outline-level="1">14. Dashboard Inicial</text:h>
      <text:p text:style-name="Text_20_body">La página principal debería mostrar:</text:p>
      <text:section text:style-name="Sect1" text:name="Sección38">
        <text:p text:style-name="P7"><text:bookmark text:name="code-block-viewer Copia 37"/><text:span text:style-name="Source_20_Text">Indicadores</text:span></text:p>
        <text:p text:style-name="Preformatted_20_Text"><text:span text:style-name="Source_20_Text">Citas del día</text:span></text:p>
        <text:p text:style-name="Preformatted_20_Text"><text:span text:style-name="Source_20_Text">Pacientes atendidos</text:span></text:p>
        <text:p text:style-name="Preformatted_20_Text"><text:span text:style-name="Source_20_Text">Facturación</text:span></text:p>
        <text:p text:style-name="Preformatted_20_Text"><text:span text:style-name="Source_20_Text">Alertas</text:span></text:p>
        <text:p text:style-name="P8"><text:span text:style-name="Source_20_Text">Notificaciones</text:span></text:p>
      </text:section>
      <text:p text:style-name="Text_20_body">Diseño:</text:p>
      <text:section text:style-name="Sect1" text:name="Sección39">
        <text:p text:style-name="P7"><text:bookmark text:name="code-block-viewer Copia 38"/><text:span text:style-name="Source_20_Text">┌──────┬──────┬──────┬──────┐</text:span></text:p>
        <text:p text:style-name="Preformatted_20_Text"><text:span text:style-name="Source_20_Text">│ KPI1 │ KPI2 │ KPI3 │ KPI4 │</text:span></text:p>
        <text:p text:style-name="Preformatted_20_Text"><text:span text:style-name="Source_20_Text">└──────┴──────┴──────┴──────┘</text:span></text:p>
        <text:p text:style-name="Preformatted_20_Text"><text:span text:style-name="Source_20_Text">┌─────────────┬─────────────┐</text:span></text:p>
        <text:p text:style-name="Preformatted_20_Text"><text:span text:style-name="Source_20_Text">│ Citas <text:s text:c="6"/>│ Alertas <text:s text:c="4"/>│</text:span></text:p>
        <text:p text:style-name="Preformatted_20_Text"><text:span text:style-name="Source_20_Text">└─────────────┴─────────────┘</text:span></text:p>
        <text:p text:style-name="Preformatted_20_Text"><text:span text:style-name="Source_20_Text">┌───────────────────────────┐</text:span></text:p>
        <text:p text:style-name="Preformatted_20_Text"><text:span text:style-name="Source_20_Text">│ Actividad Reciente <text:s text:c="7"/>│</text:span></text:p>
        <text:p text:style-name="P8"><text:span text:style-name="Source_20_Text">└───────────────────────────┘</text:span></text:p>
      </text:section>
      <text:p text:style-name="Horizontal_20_Line"><text:span text:style-name="Source_20_Text"/></text:p>
      <text:h text:style-name="Heading_20_1" text:outline-level="1">Decisión de Diseño Final para Pérgamo</text:h>
      <text:p text:style-name="Text_20_body">La interfaz de Pérgamo se construirá bajo un enfoque <text:span text:style-name="Strong_20_Emphasis">Enterprise Healthcare UI</text:span>, utilizando una paleta basada en azules institucionales, componentes tipo dashboard, animaciones sutiles, soporte nativo para Dark Mode, CSS Grid para el layout principal, Signals para el estado visual y una experiencia similar a sistemas corporativos de salud de nivel empresarial.</text:p>
      <text:p text:style-name="Text_20_body"><text:soft-page-break/>Mi recomendación es que el sistema tenga una apariencia cercana a <text:span text:style-name="Strong_20_Emphasis">Microsoft Fluent + SAP Fiori + Epic Systems</text:span>, porque transmite mucha más confianza para una IPS que un diseño tipo startup con colores muy saturados. Esto además combina perfectamente con la arquitectura hexagonal y Angular 21 que definiste para el proyect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5T21:13:31.232759054</meta:creation-date>
    <dc:date>2026-06-15T21:18:34.123713205</dc:date>
    <meta:editing-duration>PT5M4S</meta:editing-duration>
    <meta:editing-cycles>1</meta:editing-cycles>
    <meta:document-statistic meta:table-count="0" meta:image-count="0" meta:object-count="0" meta:page-count="10" meta:paragraph-count="240" meta:word-count="676" meta:character-count="4802" meta:non-whitespace-character-count="4181"/>
    <meta:generator>LibreOffice/26.2.3.2$Linux_X86_64 LibreOffice_project/620$Build-2</meta:generator>
  </office:meta>
</office:document-meta>
</file>